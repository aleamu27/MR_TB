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or å spikre systemets fundament samler vi alle de matematiske, tidsmessige og risikobaserte parameterne vi har veid og diskutert inn i et felles arkitektonisk kontrollpanel.</text:p>
      <text:p text:style-name="Text_20_body">I profesjonell systemutvikling kalles dette en <text:span text:style-name="T1">Sentralisert Konfigurasjonsfil</text:span> (<text:span text:style-name="Source_20_Text">config.py</text:span>). Ved å skille disse variablene fullstendig fra selve programlogikken, oppnår vi tre kritiske fordeler:</text:p>
      <text:list text:style-name="L1">
        <text:list-item>
          <text:p text:style-name="P1"><text:span text:style-name="T1">Sikkerhet:</text:span> Vi kan enkelt justere aggresjonsnivået eller risikotoleransen din på ett sted uten å risikere å introdusere syntaksfeil eller logiske bugs i handelsmodulene.</text:p>
        </text:list-item>
        <text:list-item>
          <text:p text:style-name="P1"><text:span text:style-name="T1">Fleksibilitet:</text:span> Den samme koden kan gjenbrukes sømløst. Når du tester systemet, peker konfigurasjonen på historiske filer; når du går live, endrer du bare endepunktene i denne filen.</text:p>
        </text:list-item>
        <text:list-item>
          <text:p text:style-name="P1"><text:span text:style-name="T1">Dokumentasjon:</text:span> Filen fungerer som en levende spesifikasjon av hele systemets matematiske og økonomiske rammeverk.</text:p>
        </text:list-item>
      </text:list>
      <text:h text:style-name="Heading_20_3" text:outline-level="3">Konfigurasjonsarkitekturen (<text:span text:style-name="Source_20_Text">config.py</text:span>)</text:h>
      <text:p text:style-name="Text_20_body">Her er strukturen på variablene som definerer rammeverket for miniprosjektet ditt. Legg merke til hvordan dine spesifikke risikovurderinger for 10k-scenarioet og "The Kill Switch" for kodefeil er integrert:</text:p>
      <text:p text:style-name="P2">Python</text:p>
      <text:p text:style-name="Preformatted_20_Text"><text:span text:style-name="Source_20_Text">"""</text:span></text:p>
      <text:p text:style-name="Preformatted_20_Text"><text:span text:style-name="Source_20_Text">SYSTEM CONFIGURATION MANAGEMENT</text:span></text:p>
      <text:p text:style-name="Preformatted_20_Text"><text:span text:style-name="Source_20_Text">Sentralisert kontrollpanel for parametere, risikobudsjett og API-miljøer.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 ==============================================================================</text:span></text:p>
      <text:p text:style-name="Preformatted_20_Text"><text:span text:style-name="Source_20_Text"># 1. API &amp; MILJØ-KONFIGURASJON</text:span></text:p>
      <text:p text:style-name="Preformatted_20_Text"><text:span text:style-name="Source_20_Text"># ==============================================================================</text:span></text:p>
      <text:p text:style-name="Preformatted_20_Text"><text:span text:style-name="Source_20_Text"># Skiller strengt mellom testmiljø (Paper) og reell kapital eksekvering (Live)</text:span></text:p>
      <text:p text:style-name="Preformatted_20_Text"><text:span text:style-name="Source_20_Text">ALPACA_ENV = "PAPER" <text:s/># Valg: "PAPER" eller "LIVE"</text:span></text:p>
      <text:p text:style-name="Preformatted_20_Text"><text:span text:style-name="Source_20_Text">BASE_URL_PAPER = "https://paper-api.alpaca.markets"</text:span></text:p>
      <text:p text:style-name="Preformatted_20_Text"><text:span text:style-name="Source_20_Text">BASE_URL_LIVE = "https://api.alpaca.markets"</text:span></text:p>
      <text:p text:style-name="Preformatted_20_Text"/>
      <text:p text:style-name="Preformatted_20_Text"/>
      <text:p text:style-name="Preformatted_20_Text"><text:span text:style-name="Source_20_Text"># ==============================================================================</text:span></text:p>
      <text:p text:style-name="Preformatted_20_Text"><text:span text:style-name="Source_20_Text"># 2. MARKEDSDATA &amp; TIDSHORISONT (DATA ENGINE PARAMETERS)</text:span></text:p>
      <text:p text:style-name="Preformatted_20_Text"><text:span text:style-name="Source_20_Text"># ==============================================================================</text:span></text:p>
      <text:p text:style-name="Preformatted_20_Text"><text:span text:style-name="Source_20_Text">TARGET_ASSETS = ["NVDA", "AMD", "TSLA"] <text:s/># Likvide og volatile aksjer utvalgt for støy</text:span></text:p>
      <text:p text:style-name="Preformatted_20_Text"><text:span text:style-name="Source_20_Text">MARKET_BENCHMARK = "SPY" <text:s text:c="15"/># Global kontrollvariabel (S&amp;P 500)</text:span></text:p>
      <text:p text:style-name="Preformatted_20_Text"/>
      <text:p text:style-name="Preformatted_20_Text"><text:span text:style-name="Source_20_Text">BAR_INTERVAL = "5m" <text:s text:c="6"/># Den matematiske "Goldilocks-sonen" for støyreduksjon</text:span></text:p>
      <text:p text:style-name="Preformatted_20_Text"><text:span text:style-name="Source_20_Text">LOOKBACK_WINDOW = 20 <text:s text:c="5"/># Antall perioder for rullende SMA og Standardavvik (100 min)</text:span></text:p>
      <text:p text:style-name="Preformatted_20_Text"/>
      <text:p text:style-name="Preformatted_20_Text"><text:span text:style-name="Source_20_Text">MARKET_OPEN_EST = "09:30" <text:s/># Filtrering av handelsfaser for å eliminere tynne volumgaps</text:span></text:p>
      <text:p text:style-name="Preformatted_20_Text"><text:span text:style-name="Source_20_Text">MARKET_CLOSE_EST = "16:00"</text:span></text:p>
      <text:p text:style-name="Preformatted_20_Text"/>
      <text:p text:style-name="Preformatted_20_Text"/>
      <text:p text:style-name="Preformatted_20_Text"><text:span text:style-name="Source_20_Text"># ==============================================================================</text:span></text:p>
      <text:p text:style-name="Preformatted_20_Text"><text:span text:style-name="Source_20_Text"># 3. STRATEGISKE TRACCERE (STRATEGY ENGINE PARAMETERS)</text:span></text:p>
      <text:p text:style-name="Preformatted_20_Text"><text:span text:style-name="Source_20_Text"># ==============================================================================</text:span></text:p>
      <text:p text:style-name="Preformatted_20_Text"><text:span text:style-name="Source_20_Text"># Deterministiske inngangs- og utgangsterskler basert på sannsynlighetsfordeling</text:span></text:p>
      <text:p text:style-name="Preformatted_20_Text"><text:span text:style-name="Source_20_Text">Z_PRICE_ENTRY_LONG = -2.5 <text:s text:c="2"/># Ekstrem underprising (nedre 0.6% av normalfordelingen)</text:span></text:p>
      <text:p text:style-name="Preformatted_20_Text"><text:soft-page-break/><text:span text:style-name="Source_20_Text">Z_PRICE_ENTRY_SHORT = 2.5 <text:s text:c="2"/># Ekstrem overpricing</text:span></text:p>
      <text:p text:style-name="Preformatted_20_Text"/>
      <text:p text:style-name="Preformatted_20_Text"><text:span text:style-name="Source_20_Text">Z_VOLUME_MAX_FILTER = 1.0 <text:s text:c="2"/># Volum-sannhetsbetingelse: Blokkerer handel ved panikk/trender</text:span></text:p>
      <text:p text:style-name="Preformatted_20_Text"><text:span text:style-name="Source_20_Text">Z_MARKET_MIN_FILTER = -1.0 <text:s/># Beta-kontroll: Blokkerer kjøp hvis hele markedet krasjer</text:span></text:p>
      <text:p text:style-name="Preformatted_20_Text"/>
      <text:p text:style-name="Preformatted_20_Text"><text:span text:style-name="Source_20_Text">Z_PRICE_EXIT_TARGET = 0.0 <text:s text:c="2"/># Suksesskriterium: Prisen har returnert til sitt matematiske snitt</text:span></text:p>
      <text:p text:style-name="Preformatted_20_Text"/>
      <text:p text:style-name="Preformatted_20_Text"/>
      <text:p text:style-name="Preformatted_20_Text"><text:span text:style-name="Source_20_Text"># ==============================================================================</text:span></text:p>
      <text:p text:style-name="Preformatted_20_Text"><text:span text:style-name="Source_20_Text"># 4. RISIKOBUDSJETT &amp; SIKKERHETSMEKANISMER (RISK MANAGER PARAMETERS)</text:span></text:p>
      <text:p text:style-name="Preformatted_20_Text"><text:span text:style-name="Source_20_Text"># ==============================================================================</text:span></text:p>
      <text:p text:style-name="Preformatted_20_Text"><text:span text:style-name="Source_20_Text"># Aktuar-forankret kapitalbeskyttelse tilpasset tidlig aggresjon og systemfeil-kontroll</text:span></text:p>
      <text:p text:style-name="Preformatted_20_Text"><text:span text:style-name="Source_20_Text">POSITION_SIZE_PCT = 0.20 <text:s text:c="6"/># Allokerer maks 20% av totalbalansen per posisjon</text:span></text:p>
      <text:p text:style-name="Preformatted_20_Text"/>
      <text:p text:style-name="Preformatted_20_Text"><text:span text:style-name="Source_20_Text">HARD_STOP_LOSS_PCT = 0.02 <text:s text:c="5"/># 2% nødutgang integrert direkte i meglernes Bracket Order</text:span></text:p>
      <text:p text:style-name="Preformatted_20_Text"><text:span text:style-name="Source_20_Text">TAKE_PROFIT_LIMIT_PCT = 0.05 <text:s text:c="2"/># Maksimal hard profitt-sperre som backup hvis Z=0 feiler</text:span></text:p>
      <text:p text:style-name="Preformatted_20_Text"/>
      <text:p text:style-name="Preformatted_20_Text"><text:span text:style-name="Source_20_Text"># "The Kill Switch" - Beskytter mot logiske løkker og kodefeil</text:span></text:p>
      <text:p text:style-name="P3"><text:span text:style-name="Source_20_Text">MAX_DAILY_DRAWDOWN_PCT = 0.03 <text:s/># Slår av systemet og dumper posisjoner ved 3% totalt kontotap</text:span></text:p>
      <text:h text:style-name="Heading_20_3" text:outline-level="3">Hvorfor denne oppbygningen er matematisk og teknisk korrekt</text:h>
      <text:p text:style-name="Text_20_body">Ved å fryse disse parameterne i arkitekturen, har vi nå klargjort systemet for de neste fasene. <text:span text:style-name="Source_20_Text">Data Engine</text:span> vil lese <text:span text:style-name="Source_20_Text">LOOKBACK_WINDOW</text:span> og <text:span text:style-name="Source_20_Text">BAR_INTERVAL</text:span> for å strukturere Pandas-matrisene sine. <text:span text:style-name="Source_20_Text">Strategy Engine</text:span> vil bruke tersklene under punkt 3 for å spytte ut signaler, og <text:span text:style-name="Source_20_Text">Risk Manager</text:span> vil bruke prosentene under punkt 4 til å regne ut nøyaktig hvor mange fraksjonelle aksjer som skal kjøpes i det sekundet signalet blir grønt.</text:p>
      <text:p text:style-name="Text_20_body">Dette er den arkitektoniske "kontrakten" mellom modulene dine.</text:p>
      <text:h text:style-name="Heading_20_3" text:outline-level="3">Hva er neste steg?</text:h>
      <text:p text:style-name="Text_20_body">Nå som konfigurasjonsstrukturen er definert på papiret, er vi klare for å designe <text:span text:style-name="T1">Klassestrukturen og Grensesnittene (Class Interfaces)</text:span> for de fire modulene. Det betyr at vi definerer nøyaktig hvilke funksjoner og metoder hver modul skal inneholde, og hvordan de skal sende data til hverandre (metode-signaturer), uten å skrive den faktiske koden på innsiden ennå.</text:p>
      <text:p text:style-name="Text_20_body">Skal vi gå løs på å definere grensesnittene for komponentene, slik at du ser hvordan objektene i systemet ditt kommer til å snakke sammen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3:08:10.131554000</meta:creation-date>
    <dc:date>2026-06-06T03:08:17.292507000</dc:date>
    <meta:editing-duration>PT7S</meta:editing-duration>
    <meta:editing-cycles>1</meta:editing-cycles>
    <meta:document-statistic meta:table-count="0" meta:image-count="0" meta:object-count="0" meta:page-count="2" meta:paragraph-count="52" meta:word-count="575" meta:character-count="4755" meta:non-whitespace-character-count="4183"/>
    <meta:generator>LibreOffice/26.2.3.2$MacOSX_AARCH64 LibreOffice_project/70e089b17412e4cb7773e41413306b17a2328c34</meta:generator>
  </office:meta>
</office:document-meta>
</file>