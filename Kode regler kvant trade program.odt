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Text_20_body" style:list-style-name="L1">
      <style:text-properties fo:font-weight="bold"/>
    </style:style>
    <style:style style:name="P2" style:family="paragraph" style:parent-style-name="Text_20_body" style:list-style-name="L1">
      <style:paragraph-properties fo:margin-left="0cm" fo:margin-right="0cm" fo:text-indent="0cm" style:auto-text-indent="false"/>
    </style:style>
    <style:style style:name="P3" style:family="paragraph" style:parent-style-name="Preformatted_20_Text" style:list-style-name="L1"/>
    <style:style style:name="P4" style:family="paragraph" style:parent-style-name="Preformatted_20_Text" style:list-style-name="L1">
      <style:paragraph-properties fo:margin-top="0cm" fo:margin-bottom="0.499cm" style: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paragraph-properties fo:margin-left="0cm" fo:margin-right="0cm" fo:text-indent="0cm" style:auto-text-indent="false"/>
    </style:style>
    <style:style style:name="P8" style:family="paragraph" style:parent-style-name="Preformatted_20_Text">
      <style:paragraph-properties fo:margin-top="0cm" fo:margin-bottom="0.499cm" style:contextual-spacing="false"/>
    </style:style>
    <style:style style:name="P9" style:family="paragraph" style:parent-style-name="Text_20_body" style:list-style-name="L3"/>
    <style:style style:name="P10" style:family="paragraph" style:parent-style-name="Text_20_body" style:list-style-name="L3">
      <style:paragraph-properties fo:margin-left="0cm" fo:margin-right="0cm" fo:text-indent="0cm" style:auto-text-indent="false"/>
    </style:style>
    <style:style style:name="P11" style:family="paragraph" style:parent-style-name="Preformatted_20_Text" style:list-style-name="L3"/>
    <style:style style:name="P12" style:family="paragraph" style:parent-style-name="Preformatted_20_Text" style:list-style-name="L3">
      <style:paragraph-properties fo:margin-top="0cm" fo:margin-bottom="0.499cm" style:contextual-spacing="false"/>
    </style:style>
    <style:style style:name="P13" style:family="paragraph" style:parent-style-name="Text_20_body" style:list-style-name="L4"/>
    <style:style style:name="P14" style:family="paragraph" style:parent-style-name="Text_20_body" style:list-style-name="L5"/>
    <style:style style:name="T1" style:family="text">
      <style:text-properties fo:font-weight="bold"/>
    </style:style>
    <style:style style:name="T2"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er er en teknisk "regelbok" skreddersydd for kvantitativ trading i Python. Siden du skal gå inn med ekte penger, handler disse reglene både om å tyne maksimal <text:span text:style-name="T1">hastighet</text:span> ut av koden, og om å unngå <text:span text:style-name="T1">systemkritiske feil</text:span> som kan tømme kontoen din.</text:p>
      <text:h text:style-name="Heading_20_2" text:outline-level="2">DEL 1: Fartsreglene (Hvordan unngå treg kode)</text:h>
      <text:h text:style-name="Heading_20_3" text:outline-level="3">Regel 1: For-løkker er bannlyst på tidsserier</text:h>
      <text:p text:style-name="Text_20_body">Ren Python tolker én og én linje av gangen. Hvis du bruker en <text:span text:style-name="Source_20_Text">for</text:span>-løkke til å gå gjennom 10 000 historiske aksjekurser for å regne ut et snitt, tar det evigheter.</text:p>
      <text:list text:style-name="L1">
        <text:list-item>
          <text:p text:style-name="P1">Galt (Sakte):</text:p>
          <text:p text:style-name="P2">Python</text:p>
          <text:p text:style-name="P3"><text:span text:style-name="Source_20_Text"># IKKE GJØR DETTE</text:span></text:p>
          <text:p text:style-name="P3"><text:span text:style-name="Source_20_Text">for i in range(len(df)):</text:span></text:p>
          <text:p text:style-name="P4"><text:span text:style-name="Source_20_Text"><text:s text:c="4"/>df['snitt'][i] = df['Close'][i-20:i].mean()</text:span></text:p>
        </text:list-item>
        <text:list-item>
          <text:p text:style-name="P5"><text:span text:style-name="T1">Riktig (Lynraskt):</text:span> Bruk <text:span text:style-name="T1">vektorisering</text:span> med Pandas/Numpy. Dette dytter operasjonen ned til kompilerte C-rutiner.</text:p>
          <text:p text:style-name="P2">Python</text:p>
          <text:p text:style-name="P4"><text:span text:style-name="Source_20_Text">df['snitt'] = df['Close'].rolling(window=20).mean()</text:span></text:p>
        </text:list-item>
      </text:list>
      <text:h text:style-name="Heading_20_3" text:outline-level="3">Regel 2: Forhåndsalloker minne (Unngå <text:span text:style-name="Source_20_Text">.append()</text:span> i løkker)</text:h>
      <text:p text:style-name="Text_20_body">Hvis du absolutt må bruke en løkke (f.eks. når du mottar live-strømmer av data via WebSockets), må du aldri utvide en Pandas DataFrame dynamisk linje for linje. Det tvinger Python til å reallokere minne i bakgrunnen hele tiden.</text:p>
      <text:list text:style-name="L2">
        <text:list-item>
          <text:p text:style-name="P6"><text:span text:style-name="T1">Galt (Sakte):</text:span> <text:span text:style-name="Source_20_Text">df = df.append(ny_rad)</text:span> eller <text:span text:style-name="Source_20_Text">df.loc[len(df)] = ny_data</text:span>.</text:p>
        </text:list-item>
        <text:list-item>
          <text:p text:style-name="P6"><text:span text:style-name="T1">Riktig (Raskt):</text:span> Samle de nye datapunktene i en vanlig Python-liste med ordbøker (<text:span text:style-name="Source_20_Text">dictionaries</text:span>), og konverter hele listen til en DataFrame når du trenger å gjøre tunge analyser. Python er veldig rask på <text:span text:style-name="Source_20_Text">.append()</text:span> i vanlige lister.</text:p>
        </text:list-item>
      </text:list>
      <text:h text:style-name="Heading_20_3" text:outline-level="3">Regel 3: Bruk riktig datatype (Float32 vs Float64)</text:h>
      <text:p text:style-name="Text_20_body">Pandas bruker som standard 64-biters flyttall (<text:span text:style-name="Source_20_Text">float64</text:span>). Hvis du prosesserer millioner av datapunkter, tar dette unødvendig mye plass i CPU-cachen. Ved å nedskalere til <text:span text:style-name="Source_20_Text">float32</text:span> kan du ofte doble farten på matematiske matriseoperasjoner uten merkbart tap av presisjon for aksjekurser.</text:p>
      <text:p text:style-name="P7">Python</text:p>
      <text:p text:style-name="P8"><text:span text:style-name="Source_20_Text">df['Close'] = df['Close'].astype('float32')</text:span></text:p>
      <text:h text:style-name="Heading_20_2" text:outline-level="2">DEL 2: Sikkerhetsreglene (Rettet mot Live-API)</text:h>
      <text:p text:style-name="Text_20_body">Når koden din kjører live på Alpaca mot ekte penger, må den være rigget som et industrielt system.</text:p>
      <text:h text:style-name="Heading_20_3" text:outline-level="3"><text:soft-page-break/>Regel 4: Aldri lagre API-nøkler i koden</text:h>
      <text:p text:style-name="Text_20_body">Hvis du ved et uhell dytter koden din til GitHub med Alpaca-nøklene dine synlige, finnes det roboter som skanner nettet og tømmer kontoen din i løpet av tre minutter.</text:p>
      <text:list text:style-name="L3">
        <text:list-item>
          <text:p text:style-name="P9"><text:span text:style-name="T1">Løsning:</text:span> Bruk en <text:span text:style-name="Source_20_Text">.env</text:span>-fil og biblioteket <text:span text:style-name="Source_20_Text">python-dotenv</text:span>.</text:p>
          <text:p text:style-name="P10">Python</text:p>
          <text:p text:style-name="P11"><text:span text:style-name="Source_20_Text">import os</text:span></text:p>
          <text:p text:style-name="P11"><text:span text:style-name="Source_20_Text">from dotenv import load_dotenv</text:span></text:p>
          <text:p text:style-name="P11"/>
          <text:p text:style-name="P11"><text:span text:style-name="Source_20_Text">load_dotenv()</text:span></text:p>
          <text:p text:style-name="P12"><text:span text:style-name="Source_20_Text">API_KEY = os.getenv("ALPACA_API_KEY")</text:span></text:p>
        </text:list-item>
      </text:list>
      <text:h text:style-name="Heading_20_3" text:outline-level="3">Regel 5: "Gjør eller dø"-feilhåndtering (Try/Except)</text:h>
      <text:p text:style-name="Text_20_body">Når du henter data over nettverk, <text:span text:style-name="T2">vil</text:span> API-kall feile før eller siden på grunn av nettverksstøy. Hvis koden din krasjer og stopper midt i en åpen posisjon, mister du kontrollen.</text:p>
      <text:p text:style-name="Text_20_body">Hvert eneste nettverkskall må pakkes inn, og du må vite nøyaktig hva som skal skje hvis det feiler:</text:p>
      <text:p text:style-name="P7">Python</text:p>
      <text:p text:style-name="Preformatted_20_Text"><text:span text:style-name="Source_20_Text">try:</text:span></text:p>
      <text:p text:style-name="Preformatted_20_Text"><text:span text:style-name="Source_20_Text"><text:s text:c="4"/>ordre = alpaca.submit_order(symbol="NVDA", qty=1, side="buy", ...)</text:span></text:p>
      <text:p text:style-name="Preformatted_20_Text"><text:span text:style-name="Source_20_Text">except Exception as e:</text:span></text:p>
      <text:p text:style-name="Preformatted_20_Text"><text:span text:style-name="Source_20_Text"><text:s text:c="4"/># Logg feilen, send deg selv et varsel, og prøv igjen eller steng systemet trygt</text:span></text:p>
      <text:p text:style-name="P8"><text:span text:style-name="Source_20_Text"><text:s text:c="4"/>print(f"KRITISK FEIL: Kunne ikke sende ordre: {e}")</text:span></text:p>
      <text:h text:style-name="Heading_20_3" text:outline-level="3">Regel 6: Sjekk "Giring-grensen" (Margin/Leverage)</text:h>
      <text:p text:style-name="Text_20_body">Hvis du har en konto med mulighet for giring, lar Alpaca deg kjøpe aksjer for mer penger enn du faktisk har satt inn. Hvis algoritmen din får en logisk bug og går "all in" med maksimal giring på en volatil aksje, risikerer du at megleren tvangsselger posisjonene dine med tap (<text:span text:style-name="T2">Margin Call</text:span>).</text:p>
      <text:list text:style-name="L4">
        <text:list-item>
          <text:p text:style-name="P13"><text:span text:style-name="T1">Regel:</text:span> Kodingen skal alltid sjekke <text:span text:style-name="Source_20_Text">buying_power</text:span> fra API-et <text:span text:style-name="T2">før</text:span> den kalkulerer hvor mange aksjer den har råd til å kjøpe. Aldri hardkod antall aksjer.</text:p>
        </text:list-item>
      </text:list>
      <text:h text:style-name="Heading_20_2" text:outline-level="2">DEL 3: Logiske Regler (Unngå falsk profitt)</text:h>
      <text:h text:style-name="Heading_20_3" text:outline-level="3">Regel 7: Sjekk for "Look-Ahead Bias" i backtesting</text:h>
      <text:p text:style-name="Text_20_body">Dette er den vanligste logiske feilen utviklere gjør. Det skjer når koden din i en simulering bruker data fra fremtiden til å ta en avgjørelse i fortiden.</text:p>
      <text:list text:style-name="L5">
        <text:list-item>
          <text:p text:style-name="P14"><text:span text:style-name="T1">Eksempel på feil:</text:span> Hvis du bruker <text:span text:style-name="Source_20_Text">df['Close'].shift(-1)</text:span> i koden din, forteller du algoritmen hva lukkekursen blir i <text:span text:style-name="T2">neste</text:span> periode. Da vil backtesten din se ekstremt profitabel ut, men den er umulig å kjøre live, fordi du ikke kjenner morgendagens kurs i dag.</text:p>
        </text:list-item>
      </text:list>
      <text:h text:style-name="Heading_20_3" text:outline-level="3"><text:soft-page-break/>Regel 8: Ta høyde for "Slippage" og Avgifter i simuleringen</text:h>
      <text:p text:style-name="Text_20_body">Hvis backtesten din viser at strategien din tjener i snitt 0,05 % per handel, men du ikke har kodet inn at prisen kan flytte seg litt før ordren blir fylt (slippage), vil strategien tape penger live. Du må alltid legge inn en "straff" på kurshorisonten i backtesten for å simulere den ekte verdenen.</text:p>
      <text:p text:style-name="Text_20_body"><text:span text:style-name="T1">Kort oppsummert for helgen:</text:span> Skriv koden din i <text:span text:style-name="T1">vektorisert form</text:span> (Pandas), bruk <text:span text:style-name="T1">Limit Orders</text:span> i stedet for Market Orders, og pakk inn alle API-kall i <text:span text:style-name="T1">Try/Except</text:span>-blokker. Da har du et fundament som tåler møtet med det virkelige markedet på mandag.</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b" fo:country="NO"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6T02:42:17.100303000</meta:creation-date>
    <dc:date>2026-06-06T02:45:56.785514000</dc:date>
    <meta:editing-duration>PT3M40S</meta:editing-duration>
    <meta:editing-cycles>1</meta:editing-cycles>
    <meta:document-statistic meta:table-count="0" meta:image-count="0" meta:object-count="0" meta:page-count="3" meta:paragraph-count="50" meta:word-count="714" meta:character-count="4412" meta:non-whitespace-character-count="3750"/>
    <meta:generator>LibreOffice/26.2.3.2$MacOSX_AARCH64 LibreOffice_project/70e089b17412e4cb7773e41413306b17a2328c34</meta:generator>
  </office:meta>
</office:document-meta>
</file>