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text-properties style:font-name="Google Sans Text" officeooo:rsid="00112d8f" officeooo:paragraph-rsid="00112d8f"/>
    </style:style>
    <style:style style:name="P2"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officeooo:rsid="00112d8f"/>
    </style:style>
    <style:style style:name="P3" style:family="paragraph" style:parent-style-name="Heading_20_2">
      <style:paragraph-properties fo:margin-left="0cm" fo:margin-right="0cm" fo:margin-top="0cm" fo:margin-bottom="0.247cm" style:contextual-spacing="false" fo:line-height="114%" fo:text-indent="0cm" style:auto-text-indent="false"/>
      <style:text-properties style:font-name="Google Sans" officeooo:rsid="00112d8f"/>
    </style:style>
    <style:style style:name="P4" style:family="paragraph" style:parent-style-name="Heading_20_3">
      <style:paragraph-properties fo:margin-left="0cm" fo:margin-right="0cm" fo:margin-top="0cm" fo:margin-bottom="0.247cm" style:contextual-spacing="false" fo:line-height="114%" fo:text-indent="0cm" style:auto-text-indent="false"/>
      <style:text-properties style:font-name="Google Sans" officeooo:rsid="00112d8f"/>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officeooo:rsid="00112d8f"/>
    </style:style>
    <style:style style:name="P6" style:family="paragraph" style:parent-style-name="Heading_20_3">
      <style:paragraph-properties fo:margin-left="0cm" fo:margin-right="0cm" fo:margin-top="0cm" fo:margin-bottom="0.212cm" style:contextual-spacing="false" fo:line-height="114%" fo:text-indent="0cm" style:auto-text-indent="false"/>
      <style:text-properties officeooo:rsid="00112d8f"/>
    </style:style>
    <style:style style:name="P7"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officeooo:rsid="00112d8f"/>
    </style:style>
    <style:style style:name="P8"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officeooo:rsid="00112d8f"/>
    </style:style>
    <style:style style:name="P9"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officeooo:rsid="00112d8f"/>
    </style:style>
    <style:style style:name="P10"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officeooo:rsid="00112d8f"/>
    </style:style>
    <style:style style:name="P11"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officeooo:rsid="00112d8f"/>
    </style:style>
    <style:style style:name="P12"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officeooo:rsid="00112d8f"/>
    </style:style>
    <style:style style:name="P13" style:family="paragraph" style:parent-style-name="Standard">
      <style:text-properties officeooo:rsid="00112d8f" officeooo:paragraph-rsid="00112d8f"/>
    </style:style>
    <style:style style:name="T1" style:family="text">
      <style:text-properties fo:font-style="italic"/>
    </style:style>
    <style:style style:name="T2" style:family="text">
      <style:text-properties fo:font-weight="bold"/>
    </style:style>
    <style:style style:name="T3" style:family="text">
      <style:text-properties style:font-name="Google Sans"/>
    </style:style>
    <style:style style:name="T4" style:family="text">
      <style:text-properties style:font-name="Google Sans Text"/>
    </style:style>
    <style:style style:name="T5" style:family="text">
      <style:text-properties style:font-name="Google Sans Text"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år man bygger et kvantitativt tradingsystem for rask avkastning med lav kapital, er datainnhenting og datavasking (preprocessing) de mest kritiske komponentene i hele arkitekturen. I kvanteverdenen gjelder det brutale prinsippet <text:span text:style-name="T1">Garbage In, Garbage Out</text:span> – hvis rådataene inneholder støy, feil eller tidsforskyvninger, vil selv den mest geniale matematiske modell generere tap live.</text:p>
      <text:p text:style-name="P2">Dette dokumentet drøfter og veier de tekniske og metodologiske beslutningene bak hvordan dataene hentes, hvorfor de vaskes som de gjør, og hvordan dataene, strategien og modellen smelter sammen til en helhetlig edge.</text:p>
      <text:h text:style-name="P3" text:outline-level="2">1. Datainnhenting: Strategiske beslutninger og avveininger</text:h>
      <text:p text:style-name="P2">For en multivariat <text:span text:style-name="T1">Mean Reversion</text:span>-strategi er valget av datakilder og tidsintervaller en hårfin balanse mellom statistisk signifikans og tekniske begrensninger.</text:p>
      <text:h text:style-name="P4" text:outline-level="3">Tidsintervall: Hvorfor nøyaktig 5 minutter?</text:h>
      <text:p text:style-name="P2">Valget av 5-minutters intervaller (bars) fremfor 1-minutt eller 1-time er et bevisst kompromiss:</text:p>
      <text:list text:style-name="L1">
        <text:list-item>
          <text:p text:style-name="P5"><text:span text:style-name="T2">Hvorfor ikke 1-minutt?</text:span> 1-minuttsdata i aksjemarkedet inneholder en enorm mengde mikro-støy, forårsaket av institusjonelle algoritmer som splitter opp store ordrer (f.eks. VWAP-algoritmer). På dette nivået dominerer markedsstrukturen (ordrebokdynamikk) over statistiske anomalier. I tillegg vil en lavkapital-bot på en vanlig internettlinje i Norge lide under nettverkslatens; innen et 1-minutts-signal er oppdaget og sendt, kan muligheten være borte.</text:p>
        </text:list-item>
        <text:list-item>
          <text:p text:style-name="P5"><text:span text:style-name="T2">Hvorfor ikke 1-time?</text:span> 1-timesdata blir for tregt når målet er å generere rask avkastning. Antall handelstriggere per uke faller drastisk, og kapitalen blir bundet opp over lengre tid, noe som øker risikoen for markedssvingninger utenom åpningstid (<text:span text:style-name="T1">overnight risk</text:span>).</text:p>
        </text:list-item>
        <text:list-item>
          <text:p text:style-name="P5"><text:span text:style-name="T2">Nyansen:</text:span> 5-minuttersintervaller er den matematiske "Goldilocks-sonen". Det er langt nok til at den verste HFT-støyen (High-Frequency Trading) jevnes ut, slik at standardavviket blir reelt og målbart. Samtidig er det kort nok til at vi kan fange opp kortsiktige likviditetsmangler og overreaksjoner, og lukke posisjonen innenfor samme handelsdag.</text:p>
        </text:list-item>
      </text:list>
      <text:h text:style-name="P6" text:outline-level="3"><text:span text:style-name="T3">Valg av datakilder: </text:span><text:span text:style-name="Source_20_Text"><text:span text:style-name="T4">yfinance</text:span></text:span><text:span text:style-name="T3"> kontra live megler-API (Alpaca)</text:span></text:h>
      <text:p text:style-name="P2">For historisk analyse (backtesting) og live-testing gjøres det en fundamental distinksjon i datainnhentingen:</text:p>
      <text:list text:style-name="L2">
        <text:list-item>
          <text:p text:style-name="P7"><text:span text:style-name="T5">Historiske data:</text:span><text:span text:style-name="T4"> Her veies gratis tilgang opp mot datakvalitet. </text:span><text:span text:style-name="Source_20_Text"><text:span text:style-name="T4">yfinance</text:span></text:span><text:span text:style-name="T4"> (Yahoo Finance) er utmerket for rask prototyping, men historiske data kan lide av manglende justeringer for selskapshendelser (splitter/utbytte) i sanntid, samt manglende granularity på historiske minuttdata langt tilbake i tid. For et miniprofil-prosjekt aksepteres denne risikoen i forskningsfasen, men for live-koding må historiske data valideres mot Alpacas egne historiske API-endepunkter for å sikre konsistens mellom testmiljø og livemiljø.</text:span></text:p>
        </text:list-item>
        <text:list-item>
          <text:p text:style-name="P8"><text:soft-page-break/><text:span text:style-name="T2">Sanntidsdata:</text:span> Live-data må strømmes via WebSockets direkte fra Alpaca. REST API (polling) er for tregt og skaper unødvendig nettverkstrafikk. WebSockets skyver dataene til scriptet ditt i det sekundet en 5-minutters bar lukkes, noe som minimerer tidsforskyvningen.</text:p>
        </text:list-item>
      </text:list>
      <text:h text:style-name="P3" text:outline-level="2">2. Datavasking: Metodikken bak eliminering av feilkilder</text:h>
      <text:p text:style-name="P2">Rå aksjedata er skitne. Datavaskingen i dette systemet handler ikke bare om å fjerne "tomme felter", men om å beskytte modellen mot matematiske vrengninger og logiske feller.</text:p>
      <text:h text:style-name="P4" text:outline-level="3">Håndtering av "Gaps" og handelsfrie perioder (Pre/Post-market)</text:h>
      <text:p text:style-name="P2">Det amerikanske aksjemarkedet er formelt åpent fra 09:30 til 16:00 EST. Det foregår imidlertid betydelig handel både før og etter dette (Pre-market og After-hours).</text:p>
      <text:list text:style-name="L3">
        <text:list-item>
          <text:p text:style-name="P9"><text:span text:style-name="T2">Beslutning:</text:span> Vi filtrerer bort og sletter alle datapunkter utenom ordinær åpningstid.</text:p>
        </text:list-item>
        <text:list-item>
          <text:p text:style-name="P9"><text:span text:style-name="T2">Begrunnelse:</text:span> Volumet i utvidet arbeidstid er ekstremt tynt. Lav likviditet gjør at Z-scoren på pris vil skyte ut i ekstreme ytterpunkter konstant, uten at det representerer en reell statistisk anomali som kan handles. Hvis vi beholder disse dataene, vil det glidende snittet (SMA) og standardavviket ($\sigma$) bli fullstendig forvrengt når det ordinære markedet åpner. Modellen tvinges til å starte med blanke ark (eller en kontrollert lookback-historie) fra nøyaktig kl. 09:30 hver dag.</text:p>
        </text:list-item>
      </text:list>
      <text:h text:style-name="P4" text:outline-level="3">Vasking av volumdata: Sannhetsbetingelsen</text:h>
      <text:p text:style-name="P2">Volumdata har en "høyre-skjev" sannsynlighetsfordeling; det kan ikke være mindre enn null, men det kan i teorien eksplodere til uendelig ved store nyheter.</text:p>
      <text:list text:style-name="L4">
        <text:list-item>
          <text:p text:style-name="P10"><text:span text:style-name="T2">Metodisk grep:</text:span> Volumdata vaskes ved at vi bruker logaritmisk transformasjon eller en streng rullende trimming (winsorizing) av ekstreme utskudd (<text:span text:style-name="T1">outliers</text:span>) før vi regner ut volum-Z-scoren. Hvis en aksje opplever et volum som er 10 standardavvik over snittet på grunn av en børsmelding, vil det rullende standardavviket blåses opp i dager etterpå. Dette vil gjøre at fremtidige, legitime volumtopper ikke blir oppdaget fordi målestokken ble ødelagt.</text:p>
        </text:list-item>
      </text:list>
      <text:h text:style-name="P4" text:outline-level="3">Synkronisering av tidsrekker (Aksje vs. Indeks)</text:h>
      <text:p text:style-name="P2">Siden modellen er multivariat og sammenligner aksjen (f.eks. NVDA) med markedsindeksen (SPY), må tidsrekkene være 100 % synkroniserte på tidsstempel (timestamp). Hvis NVDA har hatt et handelsavbrudd i noen minutter, vil radene i Pandas bli forskjøvet.</text:p>
      <text:list text:style-name="L5">
        <text:list-item>
          <text:p text:style-name="P11"><text:span text:style-name="T5">Metodisk grep:</text:span><text:span text:style-name="T4"> Vi gjør en </text:span><text:span text:style-name="Source_20_Text"><text:span text:style-name="T4">inner join</text:span></text:span><text:span text:style-name="T4"> eller en streng </text:span><text:span text:style-name="Source_20_Text"><text:span text:style-name="T4">reindex</text:span></text:span><text:span text:style-name="T4"> basert på indeksen (SPY). Manglende verdier fylles aldri med </text:span><text:span text:style-name="Source_20_Text"><text:span text:style-name="T4">fillna(method='ffill')</text:span></text:span><text:span text:style-name="T4"> (forward fill) i backtesting hvis det kan unngås, da dette simulerer at en pris står stille når den i virkeligheten ikke har data, noe som skaper falske prissignaler.</text:span></text:p>
        </text:list-item>
      </text:list>
      <text:h text:style-name="P3" text:outline-level="2"><text:soft-page-break/>3. Syntese: Hvorfor dataene, strategien og modellen passer perfekt sammen</text:h>
      <text:p text:style-name="P2">Det absolutte suksesskriteriet for dette systemet er den tette koblingen mellom hvordan dataene er strukturert, hva strategien krever, og hvordan modellen beregner risiko.</text:p>
      <text:h text:style-name="P4" text:outline-level="3">Dataenes natur matcher Mean Reversion</text:h>
      <text:p text:style-name="P2"><text:span text:style-name="T1">Mean Reversion</text:span> fungerer best i regimer der prisbevegelsene er tilnærmet normalfordelte (Gaussiske) på kort sikt. Ved å bruke 5-minuttersintervaller i tidsperioder uten store nyheter, oppfører aksjekurser seg ofte som en <text:span text:style-name="T1">stokastisk mean-reverting prosess</text:span> (en Ornstein-Uhlenbeck-prosess). Dataene vi samler inn har akkurat de statistiske egenskapene som Z-score-modellen forutsetter. Hvis vi hadde brukt dagsdata, ville trendkomponenten dominert, og <text:span text:style-name="T1">Mean Reversion</text:span> ville feilet fordi aksjer over tid har en tendens til å trende oppover (ikke vende tilbake til et gammelt snitt).</text:p>
      <text:h text:style-name="P4" text:outline-level="3">Multivariate filtre beskytter mot dataenes svakheter</text:h>
      <text:p text:style-name="P2">Modellen er designet for å kompensere for at rå prisdata alene er utilstrekkelig.</text:p>
      <text:list text:style-name="L6">
        <text:list-item>
          <text:p text:style-name="P12">Ved å koble pris-Z-score sammen med volum-Z-score, utnytter vi markedsstrukturen: <text:span text:style-name="T1">Prisbortfall på lavt volum indikerer midlertidig likviditetsmangel (støy); prisbortfall på høyt volum indikerer institusjonell distribusjon (trend).</text:span> Modellen bruker volumdataene som et filter for å skille mellom når den skal stole på prisdataene og når den skal forkaste dem.</text:p>
        </text:list-item>
        <text:list-item>
          <text:p text:style-name="P12">Ved å integrere SPY-data (Beta-filtrering) tar modellen høyde for at enkeltaksjer er underlagt systemisk risiko. Dataene for markedet fungerer som en global kontrollvariabel.</text:p>
        </text:list-item>
      </text:list>
      <text:h text:style-name="P4" text:outline-level="3">Tilpasset en uavhengig utviklers ressurser</text:h>
      <text:p text:style-name="P2">Hvorfor ikke en mer avansert modell? Hvis vi hadde lagt til fundamentale regnskapsdata (PE-rate, kvartalstall), ville datafrekvensen vært helt asynkron (regnskap kommer hver 3. måned, priser hvert 5. minutt). Det ville krevd en helt annen og mer kompleks datastruktur.</text:p>
      <text:p text:style-name="P2">Hvis vi hadde valgt en ren maskinlæringsmodell (f.eks. en XGBoost- eller LSTM-modell), ville dataene krevd ekstrem transformasjon (stasjonæritets-testing, differensiering, fjerning av trend), noe som ofte fjerner selve signalet vi prøver å fange opp.</text:p>
      <text:p text:style-name="P2">Z-score-modellen vår er <text:span text:style-name="T2">deterministisk og lineær</text:span>. Den krever kun rå, vaskede tidsserier og enkle statistiske parametere. Dette gjør at beregningene kan gjøres i sanntid på en helt vanlig datamaskin, uten latens i selve eksekveringsfasen, og passer dermed perfekt med målet om å distribuere et effektivt miniprosjekt med lav kapital, men med en reell matematisk edge.</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b" fo:country="NO"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6T02:53:56.276319000</meta:creation-date>
    <dc:date>2026-06-06T02:54:17.263300000</dc:date>
    <meta:editing-duration>PT21S</meta:editing-duration>
    <meta:editing-cycles>1</meta:editing-cycles>
    <meta:document-statistic meta:table-count="0" meta:image-count="0" meta:object-count="0" meta:page-count="3" meta:paragraph-count="37" meta:word-count="1073" meta:character-count="7703" meta:non-whitespace-character-count="6677"/>
    <meta:generator>LibreOffice/26.2.3.2$MacOSX_AARCH64 LibreOffice_project/70e089b17412e4cb7773e41413306b17a2328c34</meta:generator>
  </office:meta>
</office:document-meta>
</file>