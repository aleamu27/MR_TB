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Text_20_body">
      <style:text-properties fo:font-style="italic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år vi flytter oss fra teoretisk matematikk til faktisk programvarearkitektur i det skarpe aksjemarkedet, endres ingeniørutfordringen totalt. En ting er å ha rett i teorien; en helt annen ting er å ha et system som overlever møtet med nettverksfeil, API-endringer og uforutsett markedsrisiko uten å slette kontoen din.</text:p>
      <text:section text:style-name="Sect1" text:name="model-response-message-contentr_a1d92979e5fbbb23">
        <text:p text:style-name="Text_20_body">Dette dokumentet drøfter og veier de arkitektoniske valgene bak det foreslåtte <text:span text:style-name="T1">event-drevne, modulære trading-systemet</text:span>, analyserer fordeler og ulemper, og belyser hvorfor denne strukturen er valgt fremfor en monolitt eller et fullskala mikrotjeneste-design.</text:p>
        <text:h text:style-name="Heading_20_2" text:outline-level="2">1. Arkitekturens kjerne og designprinsipper</text:h>
        <text:p text:style-name="Text_20_body">Arkitekturen er fundamentalt designet rundt prinsippet om <text:span text:style-name="T1">Separation of Concerns (ansvarsdeling)</text:span> og et <text:span text:style-name="T1">lineært, asynkront dataflyt-mønster</text:span>. Systemet splittes inn i fire isolerte kjernekomponenter: <text:span text:style-name="T2">Market Data Streamer, Data Engine, Strategy Engine,</text:span> og <text:span text:style-name="T2">Execution &amp; Risk Manager</text:span>.</text:p>
        <text:p text:style-name="Text_20_body">Målet med dette designet er å skape en skarp demarkasjonslinje mellom <text:span text:style-name="T1">I/O-operasjoner</text:span> (som er uforutsigbare, trege og nettverksavhengige) og <text:span text:style-name="T1">logiske beregninger</text:span> (som er deterministiske, raske og kjører i lokalt minne).</text:p>
        <text:h text:style-name="Heading_20_2" text:outline-level="2">2. Grundig avveining av fordeler og ulemper</text:h>
        <text:p text:style-name="Text_20_body">For å forstå hvorfor akkurat denne arkitekturen er valgt for et lavkapital-miniprosjekt, må vi veie de systemtekniske egenskapene opp mot hverandre.</text:p>
        <text:h text:style-name="Heading_20_3" text:outline-level="3">Fordeler med den modulære, event-drevne arkitekturen</text:h>
        <text:list text:style-name="L1">
          <text:list-item>
            <text:p text:style-name="P2"><text:span text:style-name="T1">Abstraksjon og gjenbrukbarhet (The Backtest/Live Bridge):</text:span> Dette er den største arkitektoniske fordelen. Siden <text:span text:style-name="Source_20_Text">Strategy Engine</text:span> og <text:span text:style-name="Source_20_Text">Data Engine</text:span> overhodet ikke vet <text:span text:style-name="T2">hvor</text:span> dataene kommer fra (de bare prosesserer rader som dyttes inn), kan du teste systemet på historiske data ved å erstatte den asynkrone live-streameren med en fil-leser. Du bruker nøyaktig samme kjerne-logikk live som i backtesting. Dette eliminerer en av de vanligste feilkildene i kvant-trading: at live-systemet oppfører seg annerledes enn testsystemet fordi de ble skrevet som to ulike skript.</text:p>
          </text:list-item>
          <text:list-item>
            <text:p text:style-name="P2"><text:span text:style-name="T1">Feilisolering og defensiv koding:</text:span> Nettverkskall mot eksterne API-er feiler statistisk sett ofte. Hvis <text:span text:style-name="Source_20_Text">Execution Manager</text:span> kaster en feil fordi Alpacas ordserver har et mikrosekunds nedetid, vil ikke dette krasje <text:span text:style-name="Source_20_Text">Data Engine</text:span>. Datainnsamlingen og beregningen av Z-score fortsetter uforstyrret i sin egen kontekst. Vi kan implementere aggressive gjeninntredelsesmønstre (<text:span text:style-name="Source_20_Text">retry-logic</text:span>) i I/O-lagene uten at det låser eller forsinker den matematiske kalkuleringen.</text:p>
          </text:list-item>
          <text:list-item>
            <text:p text:style-name="P3"><text:span text:style-name="T1">Enkel enhetstesting (Unit Testing):</text:span> Siden <text:span text:style-name="Source_20_Text">Strategy Engine</text:span> er en samling av såkalte <text:span text:style-name="T2">pure functions</text:span> (funksjoner uten sideeffekter som kun tar imot tall og returnerer et tekstsignal), kan vi skrive automatiske tester for den på sekunder. Vi kan fôre den med en fiktiv pris-Z-score på −3.0 og verifisere at den faktisk returnerer <text:span text:style-name="Source_20_Text">BUY</text:span>. Vi trenger ikke simulere internettforbindelser eller databaser for å verifisere at matten i strategien fungerer.</text:p>
          </text:list-item>
        </text:list>
        <text:h text:style-name="Heading_20_3" text:outline-level="3"><text:soft-page-break/>Ulemper og tekniske kompromisser</text:h>
        <text:list text:style-name="L2">
          <text:list-item>
            <text:p text:style-name="P4"><text:span text:style-name="T1">Økt kompleksitet og boilerplate-kode:</text:span> For et lite prosjekt krever dette designet betydelig mer kode i starten. I stedet for ett enkelt skript på 50 linjer hvor alt skjer sekvensielt, må du definere grensesnitt (<text:span text:style-name="Source_20_Text">interfaces</text:span>), datastrukturer (som hendelses-objekter eller køer) og håndtere asynkron programmering i Python (<text:span text:style-name="Source_20_Text">asyncio</text:span> eller trådhåndtering). Dette øker terskelen for å få den første handelen gjennomført.</text:p>
          </text:list-item>
          <text:list-item>
            <text:p text:style-name="P4"><text:span text:style-name="T1">Intern latens-straff (In-memory latency):</text:span> Når data flyttes mellom moduler via hendelser eller rullende datakøer, introduserer man en minimal tidsforsinkelse i selve CPU-en (ofte i mikrosekund-skalaen). I en ren monolitt der verdier oppdateres direkte i globale variabler, er eksekveringen marginalt raskere. For HFT (High-Frequency Trading) er dette designet for tregt, men som argumentert for i datainnhentings-stilen, er denne interne forsinkelsen irrelevant så lenge nettverkslatensen over Atlanterhavet uansett dominerer tidsbudsjettet.</text:p>
          </text:list-item>
        </text:list>
        <text:h text:style-name="Heading_20_2" text:outline-level="2">3. Hvorfor akkurat dette designet? (Det arkitektoniske kompromisset)</text:h>
        <text:p text:style-name="Text_20_body">Når man velger arkitektur, må man unngå to ekstremer: <text:span text:style-name="T1">Under-engineering</text:span> (monolitten) og <text:span text:style-name="T1">Over-engineering</text:span> (mikrotjenester/distribuerte systemer).</text:p>
        <text:p text:style-name="P5"><text:span text:style-name="Source_20_Text">[ MONOLITT ] <text:s/>◄─────────────── [ VÅR MODELL ] ───────────────► <text:s/>[ MIKROTJENESTER ]</text:span></text:p>
        <text:p text:style-name="Preformatted_20_Text"><text:span text:style-name="Source_20_Text">(For skjør, <text:s text:c="19"/>(Modulær i minne, <text:s text:c="15"/>(Over-engineered,</text:span></text:p>
        <text:p text:style-name="Preformatted_20_Text"><text:span text:style-name="Source_20_Text"><text:s/>krasjer blindt, <text:s text:c="15"/>feilsikker, rask <text:s text:c="15"/>nettverks- overhead,</text:span></text:p>
        <text:p text:style-name="P6"><text:span text:style-name="Source_20_Text"><text:s/>umulig å backteste) <text:s text:c="11"/>å utvikle lokalt) <text:s text:c="15"/>for kompleks for én person)</text:span></text:p>
        <text:h text:style-name="Heading_20_3" text:outline-level="3">Hvorfor ikke en Monolitt?</text:h>
        <text:p text:style-name="Text_20_body">En monolitt er for skjør. Hvis du fletter datainnsamling, Z-score-beregning og ordreeksekvering inn i én lang <text:span text:style-name="Source_20_Text">while True</text:span>-løkke, skaper du en tidsbombe. Hvis et API-kall for å hente prisen bruker 3 sekunder på å svare på grunn av nettverksstøy, vil hele løkken din fryse. Da vil du gå glipp av salgssignaler, risikostyringen slutter å kjøre, og du mister kontrollen over posisjonene dine i de sekundene markedet kanskje beveger seg mot deg.</text:p>
        <text:h text:style-name="Heading_20_3" text:outline-level="3">Hvorfor ikke Mikrotjenester (Docker-containere per modul)?</text:h>
        <text:p text:style-name="Text_20_body">Flere avanserte kvant-utviklere bygger systemene sine som fullstendig distribuerte mikrotjenester, hvor datainnsamlingen kjører i én Docker-container og strategien i en annen, og de kommuniserer over nettverksprotokoller (som gRPC eller RabbitMQ). Dette er massiv over-engineering for et prosjekt med lav kapital. Det introduserer nettverkslatens <text:span text:style-name="T2">internt</text:span> på maskinen din, krever kompleks orkestrering, og gjør feilsøking ekstremt vanskelig for én enkelt utvikler.</text:p>
        <text:h text:style-name="Heading_20_3" text:outline-level="3">Konklusjon: Modulær i-minne-arkitektur</text:h>
        <text:p text:style-name="Text_20_body">Løsningen er å bygge systemet <text:span text:style-name="T1">modulært, men innenfor samme Python-prosess</text:span>. Vi bruker objekter, klasser og asynkrone køer (<text:span text:style-name="Source_20_Text">asyncio.Queue</text:span>) til å skille modulene. Da oppnår vi nesten <text:soft-page-break/>perfekt feilisolering og total frihet til å gjenbruke koden i backtesting, samtidig som vi beholder den ekstremt høye farten til internminnet (RAM) og slipper kompleksiteten med distribuerte systemer.</text:p>
        <text:p text:style-name="Text_20_body">Det er den mest rasjonelle arkitekturen for en utvikler som vil ha maksimal systemkontroll uten å kaste bort tid på unødvendig infrastruktur.</text:p>
        <text:p text:style-name="P7">Jeg stopper her, nøyaktig som du ba om, slik at du kan fordøye dette og kommentere arkitekturvalgene før vi går videre.</text:p>
      </text:section>
      <text:p text:style-name="Standard"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6T02:57:56.166889000</meta:creation-date>
    <dc:date>2026-06-06T02:58:12.818845000</dc:date>
    <meta:editing-duration>PT16S</meta:editing-duration>
    <meta:editing-cycles>1</meta:editing-cycles>
    <meta:document-statistic meta:table-count="0" meta:image-count="0" meta:object-count="0" meta:page-count="3" meta:paragraph-count="29" meta:word-count="824" meta:character-count="6020" meta:non-whitespace-character-count="5133"/>
    <meta:generator>LibreOffice/26.2.3.2$MacOSX_AARCH64 LibreOffice_project/70e089b17412e4cb7773e41413306b17a2328c34</meta:generator>
  </office:meta>
</office:document-meta>
</file>