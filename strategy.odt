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office:font-face-decls>
  <office:automatic-styles>
    <style:style style:name="P1" style:family="paragraph" style:parent-style-name="Heading_20_1">
      <style:paragraph-properties fo:margin-left="0cm" fo:margin-right="0cm" fo:margin-top="0cm" fo:margin-bottom="0.247cm" style:contextual-spacing="false" fo:line-height="114%" fo:text-indent="0cm" style:auto-text-indent="false"/>
      <style:text-properties style:font-name="Google Sans"/>
    </style:style>
    <style:style style:name="P2" style:family="paragraph" style:parent-style-name="Heading_20_2">
      <style:paragraph-properties fo:margin-left="0cm" fo:margin-right="0cm" fo:margin-top="0cm" fo:margin-bottom="0.247cm" style:contextual-spacing="false" fo:line-height="114%" fo:text-indent="0cm" style:auto-text-indent="false"/>
      <style:text-properties style:font-name="Google Sans"/>
    </style:style>
    <style:style style:name="P3" style:family="paragraph" style:parent-style-name="Text_20_body">
      <style:paragraph-properties fo:margin-left="0cm" fo:margin-right="0cm" fo:margin-top="0cm" fo:margin-bottom="0.247cm" style:contextual-spacing="false" fo:line-height="114%" fo:text-indent="0cm" style:auto-text-indent="false"/>
      <style:text-properties style:font-name="Google Sans Text"/>
    </style:style>
    <style:style style:name="P4" style:family="paragraph" style:parent-style-name="Text_20_body" style:list-style-name="L1">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5" style:family="paragraph" style:parent-style-name="Preformatted_20_Text">
      <style:paragraph-properties fo:margin-left="0cm" fo:margin-right="0cm" fo:margin-top="0cm" fo:margin-bottom="0cm" style:contextual-spacing="false" fo:line-height="114%" fo:text-indent="0cm" style:auto-text-indent="false"/>
    </style:style>
    <style:style style:name="P6" style:family="paragraph" style:parent-style-name="Preformatted_20_Text">
      <style:paragraph-properties fo:margin-top="0cm" fo:margin-bottom="0cm" style:contextual-spacing="false" fo:line-height="114%"/>
    </style:style>
    <style:style style:name="P7" style:family="paragraph" style:parent-style-name="Heading_20_3">
      <style:paragraph-properties fo:margin-left="0cm" fo:margin-right="0cm" fo:margin-top="0cm" fo:margin-bottom="0.247cm" style:contextual-spacing="false" fo:line-height="114%" fo:text-indent="0cm" style:auto-text-indent="false"/>
      <style:text-properties style:font-name="Google Sans"/>
    </style:style>
    <style:style style:name="P8" style:family="paragraph" style:parent-style-name="Text_20_body" style:list-style-name="L2">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9" style:family="paragraph" style:parent-style-name="Text_20_body" style:list-style-name="L3">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10" style:family="paragraph" style:parent-style-name="Text_20_body">
      <style:paragraph-properties fo:margin-left="0cm" fo:margin-right="0cm" fo:margin-top="0cm" fo:margin-bottom="0.247cm" style:contextual-spacing="false" fo:line-height="114%" fo:text-indent="0cm" style:auto-text-indent="false"/>
    </style:style>
    <style:style style:name="T1" style:family="text">
      <style:text-properties fo:font-weight="bold"/>
    </style:style>
    <style:style style:name="T2" style:family="text">
      <style:text-properties fo:font-style="italic"/>
    </style:style>
    <style:style style:name="T3" style:family="text">
      <style:text-properties style:font-name="Google Sans Text"/>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Strategidokument: Multivariat Mean Reversion Bot (Z-Score)</text:h>
      <text:h text:style-name="P2" text:outline-level="2">1. Hypotese</text:h>
      <text:p text:style-name="P3">Markedet på lav tidshorisont (1-minutters til 15-minutters intervaller) preges ofte av kortsiktig støy, mikro-ubalanser i ordrebøker og menneskelig/algoritmisk overreaksjon på likviditetsendringer.</text:p>
      <text:p text:style-name="P3"><text:span text:style-name="T1">Hypotesen er:</text:span> Når kurshorisonten til en ekstremt likvid aksje avviker drastisk fra sitt kortsiktige matematiske snitt uten en korresponderende økning i handelsvolum eller markedsomfattende fall, er dette avviket midlertidig. Elastisiteten i markedet vil tvinge prisen tilbake til snittet (<text:span text:style-name="T2">Mean Reversion</text:span>) i løpet av kort tid.</text:p>
      <text:h text:style-name="P2" text:outline-level="2">2. Hvorfor denne modellen kommer til å fungere</text:h>
      <text:p text:style-name="P3">Modellen baserer seg ikke på å "gjette" retning, men på å utnytte statistiske ytterpunkter. Den har en matematisk edge av tre grunner:</text:p>
      <text:list text:style-name="L1">
        <text:list-item>
          <text:p text:style-name="P4"><text:span text:style-name="T1">Likviditets-premie:</text:span> Ved å kun trade aksjer med enormt volum (f.eks. NVDA, TSLA, AMD) utnytter vi det faktum at det <text:span text:style-name="T2">alltid</text:span> er kjøpere og selgere i markedet. Når prisen presses for langt ut, vil market-makere og institusjonelle roboter automatisk tvinge prisen tilbake for å lukke gapet.</text:p>
        </text:list-item>
        <text:list-item>
          <text:p text:style-name="P4"><text:span text:style-name="T1">Volum-filteret eliminerer fundamental risiko:</text:span> Den klassiske fellen for Mean Reversion er å kjøpe en aksje som faller fordi selskapet leverte elendige resultater. Ved å kreve at handelsvolumet må være <text:span text:style-name="T2">lavt eller normalt</text:span> under prisfallet, siler vi ut de reelle, fundamentale trendene og fanger kun ren støy.</text:p>
        </text:list-item>
        <text:list-item>
          <text:p text:style-name="P4"><text:span text:style-name="T1">Beta-filteret eliminerer systemisk risiko:</text:span> Hvis hele S&amp;P 500 krasjer, faller alle aksjer uansett hvor gode de er. Ved å sjekke markedsindeksen (SPY), unngår vi å kjøpe en aksje under et generelt markedskrasj. Modellen handler kun når avviket er <text:span text:style-name="T2">isolert</text:span> til den spesifikke aksjen.</text:p>
        </text:list-item>
      </text:list>
      <text:h text:style-name="P2" text:outline-level="2">3. Modellens Arkitektur: Hvorfor den er akkurat her på spekteret</text:h>
      <text:p text:style-name="P3">Dette systemet er designet for å ligge i "Goldilocks-sonen" for en uavhengig utvikler med lav kapital: <text:span text:style-name="T1">Ikke for basic, ikke for avansert.</text:span></text:p>
      <text:p text:style-name="P5"><text:span text:style-name="Source_20_Text"><text:s text:c="3"/></text:span><text:span text:style-name="Source_20_Text"><text:span text:style-name="T3">[ BASIC ] <text:s text:c="19"/>[ VÅR MODELL ] <text:s text:c="18"/>[ AVANSERT ]</text:span></text:span></text:p>
      <text:p text:style-name="P6"><text:span text:style-name="Source_20_Text"><text:span text:style-name="T3">Ren pris-Z-score <text:s text:c="11"/>Multivariat Z-score <text:s text:c="14"/>Maskinlæring / HFT</text:span></text:span></text:p>
      <text:p text:style-name="P6"><text:span text:style-name="Source_20_Text"><text:span text:style-name="T3">(Taper penger pga. <text:s text:c="9"/>(Matematisk edge, lav kapital, <text:s text:c="4"/>(Krever millisekunder,</text:span></text:span></text:p>
      <text:p text:style-name="P6"><text:span text:style-name="Source_20_Text"><text:s/></text:span><text:span text:style-name="Source_20_Text"><text:span text:style-name="T3">fallende kniver) <text:s text:c="11"/>beskyttet mot falske signaler) <text:s text:c="3"/>servere til millioner)</text:span></text:span></text:p>
      <text:h text:style-name="P7" text:outline-level="3">Hvorfor den ikke er mer basic (F.eks. ren pris-Z-score eller RSI)</text:h>
      <text:p text:style-name="P3">En ren en-variabel modell (som kun ser på at prisen har falt mye) er en tapsmaskin i det moderne aksjemarkedet. Hvis du kun bruker pris, vil koden din kjøpe hver eneste aksje som er på vei mot konkurs eller opplever legitime, fundamentale kriser. Ved å kreve at tre <text:soft-page-break/>uavhengige datastrømmer (Pris, Volum og Markedsindeks) må samstemme, flytter vi modellen fra enkel teknisk analyse til <text:span text:style-name="T1">statistisk arbitrasje</text:span>.</text:p>
      <text:h text:style-name="P7" text:outline-level="3">Hvorfor den ikke er mer avansert (F.eks. Maskinlæring / LSTM / Nevrale nettverk)</text:h>
      <text:p text:style-name="P3">Mange utviklere hopper rett på å kode maskinlæringsmodeller (AI) for å forutsi aksjekurser. Dette feiler nesten alltid for uavhengige tradere av to årsaker:</text:p>
      <text:list text:style-name="L2">
        <text:list-item>
          <text:p text:style-name="P8"><text:span text:style-name="T1">Overfitting:</text:span> Aksjemarkedet har ekstremt lavt signal-til-støy-forhold. Komplekse nevrale nettverk er så gode til å finne mønstre at de begynner å memorere støyet i historisk data. De ser fantastiske ut i backtesting, men feiler totalt live.</text:p>
        </text:list-item>
        <text:list-item>
          <text:p text:style-name="P8"><text:span text:style-name="T1">Latens og infrastruktur:</text:span> Hvis du kjører en tung maskinlæringsmodell som bruker 200 ms på å gjøre en <text:span text:style-name="T2">inference</text:span> (prediksjon) via Python, har markedet flyttet seg før ordren din er generert.</text:p>
        </text:list-item>
      </text:list>
      <text:p text:style-name="P3">Vår modell bruker lukkede, deterministiske matematiske formler ($Z$-score). Beregningen tar mikrosekunder i Pandas, noe som betyr at du faktisk kan eksekvere handelen i det sekundet signalet oppstår.</text:p>
      <text:h text:style-name="P2" text:outline-level="2">4. De Matematiske Parametrene</text:h>
      <text:p text:style-name="P3">Modellen opererer med følgende faste, målbare regler:</text:p>
      <text:list text:style-name="L3">
        <text:list-item>
          <text:p text:style-name="P9"><text:span text:style-name="T1">Tidshorisont ($\Delta t$):</text:span> 5-minutters intervaller (fanger opp støy som varer i noen timer, samtidig som vi unngår den verste høyfrekvente støyen fra HFT-fond).</text:p>
        </text:list-item>
        <text:list-item>
          <text:p text:style-name="P9"><text:span text:style-name="T1">Lookback-periode:</text:span> 20 perioder ($20 \times 5 \text{ min} = 100 \text{ minutter}$) for å etablere det glidende snittet (SMA) og standardavviket ($\sigma$).</text:p>
        </text:list-item>
        <text:list-item>
          <text:p text:style-name="P9"><text:span text:style-name="T1">Inngangsterskel:</text:span> $Z_{pris} \le -2.5$ (Dette betyr at prisen er i den nedre $0.6\%$ av den statistiske sannsynlighetsfordelingen – en ekstrem anomali).</text:p>
        </text:list-item>
        <text:list-item>
          <text:p text:style-name="P9"><text:span text:style-name="T1">Volum-restriksjon:</text:span> $Z_{volum} &lt; 1.0$ (Sikrer at det ikke pågår panikksalg).</text:p>
        </text:list-item>
        <text:list-item>
          <text:p text:style-name="P9"><text:span text:style-name="T1">Markeds-restriksjon:</text:span> $Z_{SPY} &gt; -1.0$ (Sikrer at det generelle markedet ikke er i fritt fall).</text:p>
        </text:list-item>
        <text:list-item>
          <text:p text:style-name="P9"><text:span text:style-name="T1">Utgang (Exit):</text:span> $Z_{pris} = 0$ eller tidsbasert utgang ved slutten av handelsdagen (ingen posisjoner holdes over natten for å unngå risiko for nyheter før markedet åpner neste dag).</text:p>
        </text:list-item>
      </text:list>
      <text:p text:style-name="P3">Dette dokumentet gir deg en bunnsolid teoretisk forankring. Når du skal skrive kode eller forklare prosjektet ditt til andre, viser dette at du har tatt bevisste, rasjonelle valg basert på markedsstruktur og statistikk.</text:p>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nb" fo:country="NO"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nb" fo:country="NO"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Songti SC" style:font-family-asian="'Songti SC'" style:font-family-generic-asian="system" style:font-pitch-asian="variable" style:font-size-asian="12pt" style:font-weight-asian="bold" style:font-name-complex="Arial Unicode MS1" style:font-family-complex="'Arial Unicode MS'"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6-06T02:46:08.055959000</meta:creation-date>
    <dc:date>2026-06-06T02:49:42.472668000</dc:date>
    <meta:editing-duration>PT3M34S</meta:editing-duration>
    <meta:editing-cycles>1</meta:editing-cycles>
    <meta:document-statistic meta:table-count="0" meta:image-count="0" meta:object-count="0" meta:page-count="2" meta:paragraph-count="31" meta:word-count="682" meta:character-count="4628" meta:non-whitespace-character-count="3894"/>
    <meta:generator>LibreOffice/26.2.3.2$MacOSX_AARCH64 LibreOffice_project/70e089b17412e4cb7773e41413306b17a2328c34</meta:generator>
  </office:meta>
</office:document-meta>
</file>